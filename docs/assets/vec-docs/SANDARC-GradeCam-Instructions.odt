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80000028F2870255B44A2372E.png" manifest:media-type="image/png"/>
  <manifest:file-entry manifest:full-path="Pictures/10000201000002A700000039B38618418A6D07F4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text-properties fo:color="#ff0000"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margin-top="0in" fo:margin-bottom="0in" fo:line-height="100%" fo:text-align="center"/>
    </style:style>
    <style:style style:name="P9" style:family="paragraph">
      <loext:graphic-properties draw:fill="none"/>
      <style:paragraph-properties fo:margin-top="0in" fo:margin-bottom="0in" fo:line-height="100%" fo:text-align="center"/>
    </style:style>
    <style:style style:name="P10" style:family="paragraph">
      <style:paragraph-properties fo:margin-top="0in" fo:margin-bottom="0in" fo:line-height="100%" fo:text-align="start"/>
    </style:style>
    <style:style style:name="P11" style:family="paragraph">
      <loext:graphic-properties draw:fill="none"/>
      <style:paragraph-properties fo:margin-top="0in" fo:margin-bottom="0in" fo:line-height="100%" fo:text-align="start"/>
    </style:style>
    <style:style style:name="P12" style:family="paragraph">
      <loext:graphic-properties draw:fill="solid" draw:fill-color="#ff0000"/>
      <style:paragraph-properties fo:text-align="start"/>
    </style:style>
    <style:style style:name="T1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434343"/>
    </style:style>
    <style:style style:name="T11" style:family="text">
      <style:text-properties fo:color="#434343" style:text-underline-style="solid" style:text-underline-width="auto" style:text-underline-color="font-color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.0311in" svg:stroke-color="#ff0000" draw:stroke-linejoin="round" draw:fill="none" draw:textarea-vertical-align="middle" draw:auto-grow-height="false" draw:fit-to-size="false" style:shrink-to-fit="false" fo:min-height="0in" fo:min-width="3.85in" fo:padding-top="0.1in" fo:padding-bottom="0.1in" fo:padding-left="0.1in" fo:padding-right="0.1in" fo:wrap-option="wrap" style:run-through="foreground"/>
    </style:style>
    <style:style style:name="gr4" style:family="graphic">
      <style:graphic-properties draw:stroke="none" svg:stroke-width="0in" draw:fill="none" draw:textarea-vertical-align="middle" draw:auto-grow-height="false" draw:fit-to-size="false" style:shrink-to-fit="false" fo:min-height="0.0098in" fo:min-width="3.8508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311in" svg:stroke-color="#ff0000" draw:stroke-linejoin="round" draw:fill="none" draw:textarea-vertical-align="middle" draw:auto-grow-height="false" draw:fit-to-size="false" style:shrink-to-fit="false" fo:min-height="0in" fo:min-width="0.6953in" fo:padding-top="0.1in" fo:padding-bottom="0.1in" fo:padding-left="0.1in" fo:padding-right="0.1in" fo:wrap-option="wrap" style:run-through="foreground"/>
    </style:style>
    <style:style style:name="gr6" style:family="graphic">
      <style:graphic-properties draw:stroke="none" svg:stroke-width="0in" draw:fill="none" draw:textarea-vertical-align="middle" draw:auto-grow-height="false" draw:fit-to-size="false" style:shrink-to-fit="false" fo:min-height="0.0098in" fo:min-width="0.6957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311in" svg:stroke-color="#ff0000" draw:stroke-linejoin="round" draw:fill="none" draw:textarea-vertical-align="middle" draw:auto-grow-height="false" draw:fit-to-size="false" style:shrink-to-fit="false" fo:min-height="0in" fo:min-width="0.7925in" fo:padding-top="0.1in" fo:padding-bottom="0.1in" fo:padding-left="0.1in" fo:padding-right="0.1in" fo:wrap-option="wrap" style:run-through="foreground"/>
    </style:style>
    <style:style style:name="gr8" style:family="graphic">
      <style:graphic-properties draw:stroke="none" svg:stroke-width="0in" draw:fill="none" draw:textarea-vertical-align="middle" draw:auto-grow-height="false" draw:fit-to-size="false" style:shrink-to-fit="false" fo:min-height="0.0098in" fo:min-width="0.7756in" fo:padding-top="0.1in" fo:padding-bottom="0.1in" fo:padding-left="0.1in" fo:padding-right="0.1in" fo:wrap-option="wrap" style:run-through="foreground"/>
    </style:style>
    <style:style style:name="gr9" style:family="graphic">
      <style:graphic-properties draw:stroke="none" svg:stroke-width="0in" draw:fill="none" draw:textarea-vertical-align="middle" draw:auto-grow-height="false" draw:fit-to-size="false" style:shrink-to-fit="false" fo:min-height="0.0173in" fo:min-width="3.4717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none" svg:stroke-width="0in" draw:fill="none" draw:textarea-vertical-align="middle" draw:auto-grow-height="false" draw:fit-to-size="false" style:shrink-to-fit="false" fo:min-height="0.0173in" fo:min-width="3.0209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ff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7528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none" svg:stroke-width="0in" draw:fill="none" draw:textarea-vertical-align="middle" draw:auto-grow-height="false" draw:fit-to-size="false" style:shrink-to-fit="false" fo:min-height="0in" fo:min-width="0.0807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none" svg:stroke-width="0in" draw:fill="none" draw:textarea-vertical-align="middle" draw:auto-grow-height="false" draw:fit-to-size="false" style:shrink-to-fit="false" fo:min-height="0in" fo:min-width="0.0307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stroke-linejoin="round" draw:fill="solid" draw:fill-color="#ff0000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LEASE READ THE INSTRUCTIONS BELOW PRIOR TO THE EXAM</text:span></text:p>
      <text:p text:style-name="Standard"><text:span text:style-name="T3">If you have any questions, please </text:span><text:span text:style-name="T4">ask an examiner</text:span><text:span text:style-name="T3"> before proceeding.</text:span></text:p>
      <text:p text:style-name="P1"/>
      <text:p text:style-name="Standard"><text:span text:style-name="T5">Please find this line at the bottom of the first page of the exam booklet:</text:span></text:p>
      <text:p text:style-name="P2"/>
      <text:p text:style-name="Standard"><draw:g text:anchor-type="as-char" draw:z-index="0" draw:style-name="gr1"><draw:frame draw:name="Shape 2" draw:style-name="gr2" draw:text-style-name="P6" svg:width="6.4831in" svg:height="0.5598in" svg:x="0in" svg:y="0in"><draw:image xlink:href="Pictures/10000201000002A700000039B38618418A6D07F4.png" xlink:type="simple" xlink:show="embed" xlink:actuate="onLoad"><text:p/></draw:image></draw:frame><draw:custom-shape draw:style-name="gr3" draw:text-style-name="P7" svg:width="4.0504in" svg:height="0.0098in" draw:transform="rotate (-3.14159265358979) translate (4.07222222222222in 0.610416666666667in)"><text:p/><draw:enhanced-geometry draw:mirror-horizontal="true" draw:mirror-vertical="false" svg:viewBox="0 0 21600 21600" draw:type="mso-spt32" draw:enhanced-path="M 0 0 L 21600 21600 N"/></draw:custom-shape><draw:custom-shape draw:name="Shape 4" draw:style-name="gr4" draw:text-style-name="P9" svg:width="4.0504in" svg:height="0.2094in" svg:x="0.0228in" svg:y="0.7047in"><text:p text:style-name="P8"><text:span text:style-name="T12">Exam Elem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" draw:text-style-name="P7" svg:width="0.8953in" svg:height="0.0012in" svg:x="4.3984in" svg:y="0.6055in"><text:p/><draw:enhanced-geometry draw:mirror-horizontal="false" draw:mirror-vertical="false" svg:viewBox="0 0 21600 21600" draw:type="mso-spt32" draw:enhanced-path="M 0 0 L 21600 21600 N"/></draw:custom-shape><draw:custom-shape draw:name="Shape 6" draw:style-name="gr6" draw:text-style-name="P9" svg:width="0.8953in" svg:height="0.2094in" svg:x="4.3984in" svg:y="0.7047in"><text:p text:style-name="P8"><text:span text:style-name="T12">Exam I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7" svg:width="0.9925in" svg:height="0.0012in" svg:x="5.5075in" svg:y="0.6055in"><text:p/><draw:enhanced-geometry draw:mirror-horizontal="false" draw:mirror-vertical="false" svg:viewBox="0 0 21600 21600" draw:type="mso-spt32" draw:enhanced-path="M 0 0 L 21600 21600 N"/></draw:custom-shape><draw:custom-shape draw:name="Shape 8" draw:style-name="gr8" draw:text-style-name="P9" svg:width="0.9752in" svg:height="0.2094in" svg:x="5.5075in" svg:y="0.7047in"><text:p text:style-name="P8"><text:span text:style-name="T12">Page No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"/>
      <text:p text:style-name="Standard"><text:span text:style-name="T5">Verify that your exam booklet shows the exam element that you intend to take.</text:span></text:p>
      <text:p text:style-name="P2"/>
      <text:p text:style-name="Standard"><text:span text:style-name="T5">Verify your exam booklet is complete and that all the pages have the same exam ID.</text:span></text:p>
      <text:p text:style-name="P2"/>
      <text:p text:style-name="Standard"><text:span text:style-name="T5">Please complete the following items on your answer sheet before beginning the test:</text:span></text:p>
      <text:p text:style-name="P2"/>
      <text:list xml:id="list1236950992" text:style-name="WWNum1">
        <text:list-item>
          <text:p text:style-name="P4"><text:span text:style-name="T5">Write your name on the answer sheet.</text:span></text:p>
        </text:list-item>
        <text:list-item>
          <text:p text:style-name="P4"><text:span text:style-name="T5">Bubble the correct exam element: T - Technician, G - General, or E - Extra.</text:span></text:p>
        </text:list-item>
        <text:list-item>
          <text:p text:style-name="P4"><text:span text:style-name="T5">Write your PIN in the “Applicant ID” field and bubble the corresponding digits under it. If you do not have your PIN, ask an examiner.</text:span></text:p>
        </text:list-item>
        <text:list-item>
          <text:p text:style-name="P4"><text:span text:style-name="T5">Copy your Exam ID from </text:span><text:span text:style-name="T7">YOUR exam booklet</text:span><text:span text:style-name="T5"> (not the samples above or below) onto the “Exam ID” field and bubble the corresponding digits under it.</text:span></text:p>
        </text:list-item>
      </text:list>
      <text:p text:style-name="Standard"><draw:g text:anchor-type="as-char" draw:z-index="1" draw:style-name="gr1"><draw:frame draw:name="Shape 9" draw:style-name="gr2" draw:text-style-name="P6" svg:width="6.5004in" svg:height="3.3185in" svg:x="0in" svg:y="0in"><draw:image xlink:href="Pictures/10000201000005080000028F2870255B44A2372E.png" xlink:type="simple" xlink:show="embed" xlink:actuate="onLoad"><text:p/></draw:image></draw:frame><draw:custom-shape draw:name="Shape 10" draw:style-name="gr9" draw:text-style-name="P11" svg:width="3.6713in" svg:height="0.2169in" svg:x="1.2717in" svg:y="0.0811in"><text:p text:style-name="P10"><text:span text:style-name="T12">Your Name He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1" draw:style-name="gr10" draw:text-style-name="P11" svg:width="3.2205in" svg:height="0.2169in" svg:x="0.2882in" svg:y="1.6118in"><text:p text:style-name="P10"><text:span text:style-name="T12">Bubble the correct exam element abov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7" svg:width="0.9531in" svg:height="0.1067in" draw:transform="rotate (-3.14159265358979) translate (2.27013888888889in 1.62638888888889in)"><text:p/><draw:enhanced-geometry draw:mirror-horizontal="false" draw:mirror-vertical="false" svg:viewBox="0 0 21600 21600" draw:type="mso-spt32" draw:enhanced-path="M 0 0 L 21600 21600 N"/></draw:custom-shape><draw:custom-shape draw:name="Shape 13" draw:style-name="gr12" draw:text-style-name="P9" svg:width="0.2803in" svg:height="0.1921in" svg:x="3.9772in" svg:y="0.9283in"><text:p text:style-name="P8"><text:span text:style-name="T12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4" draw:style-name="gr13" draw:text-style-name="P9" svg:width="0.2303in" svg:height="0.1921in" svg:x="4.2583in" svg:y="0.9283in"><text:p text:style-name="P8"><text:span text:style-name="T12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" draw:style-name="gr13" draw:text-style-name="P9" svg:width="0.2303in" svg:height="0.1921in" svg:x="4.7283in" svg:y="0.9283in"><text:p text:style-name="P8"><text:span text:style-name="T12">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6" draw:style-name="gr13" draw:text-style-name="P9" svg:width="0.2303in" svg:height="0.1921in" svg:x="4.489in" svg:y="0.9283in"><text:p text:style-name="P8"><text:span text:style-name="T12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7" draw:style-name="gr14" draw:text-style-name="P12" svg:width="0.1303in" svg:height="0.1307in" svg:x="4.0689in" svg:y="1.2555in"><text:p text:style-name="P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" draw:style-name="gr14" draw:text-style-name="P12" svg:width="0.1303in" svg:height="0.1307in" svg:x="4.3083in" svg:y="1.4484in"><text:p text:style-name="P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9" draw:style-name="gr14" draw:text-style-name="P12" svg:width="0.1303in" svg:height="0.1307in" svg:x="4.539in" svg:y="1.6547in"><text:p text:style-name="P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0" draw:style-name="gr14" draw:text-style-name="P12" svg:width="0.1303in" svg:height="0.1307in" svg:x="4.7783in" svg:y="1.8291in"><text:p text:style-name="P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1" draw:style-name="gr12" draw:text-style-name="P9" svg:width="0.2803in" svg:height="0.1921in" svg:x="5.2335in" svg:y="0.9283in"><text:p text:style-name="P8"><text:span text:style-name="T12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2" draw:style-name="gr13" draw:text-style-name="P9" svg:width="0.2303in" svg:height="0.1921in" svg:x="5.5138in" svg:y="0.9283in"><text:p text:style-name="P8"><text:span text:style-name="T12">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3" draw:style-name="gr13" draw:text-style-name="P9" svg:width="0.2303in" svg:height="0.1921in" svg:x="5.7445in" svg:y="0.9283in"><text:p text:style-name="P8"><text:span text:style-name="T12">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4" draw:style-name="gr13" draw:text-style-name="P9" svg:width="0.2303in" svg:height="0.1921in" svg:x="5.9752in" svg:y="0.9283in"><text:p text:style-name="P8"><text:span text:style-name="T12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5" draw:style-name="gr13" draw:text-style-name="P9" svg:width="0.2303in" svg:height="0.1921in" svg:x="6.2055in" svg:y="0.9283in"><text:p text:style-name="P8"><text:span text:style-name="T12">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6" draw:style-name="gr14" draw:text-style-name="P12" svg:width="0.1303in" svg:height="0.1307in" svg:x="5.3201in" svg:y="1.6547in"><text:p text:style-name="P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7" draw:style-name="gr14" draw:text-style-name="P12" svg:width="0.1303in" svg:height="0.1307in" svg:x="5.7945in" svg:y="2.6083in"><text:p text:style-name="P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8" draw:style-name="gr14" draw:text-style-name="P12" svg:width="0.1303in" svg:height="0.1307in" svg:x="6.2555in" svg:y="2.6083in"><text:p text:style-name="P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9" draw:style-name="gr14" draw:text-style-name="P12" svg:width="0.1303in" svg:height="0.1307in" svg:x="6.0252in" svg:y="1.2555in"><text:p text:style-name="P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0" draw:style-name="gr14" draw:text-style-name="P12" svg:width="0.1303in" svg:height="0.1315in" svg:x="5.5638in" svg:y="2.4134in"><text:p text:style-name="P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" draw:style-name="gr14" draw:text-style-name="P12" svg:width="0.1303in" svg:height="0.1307in" svg:x="0.4917in" svg:y="1.4484in"><text:p text:style-name="P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<text:p text:style-name="Standard"/>
      <text:p text:style-name="Standard"/>
      <text:p text:style-name="Standard">GOOD LUCK! Make sure you answer all of the questions. Let us know when you fini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fo:font-size="13pt" style:font-size-asian="13pt" style:font-size-complex="13pt"/>
    </style:style>
    <style:style style:name="MT2" style:family="text">
      <style:text-properties fo:color="#434343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color="#434343" style:text-underline-style="solid" style:text-underline-width="auto" style:text-underline-color="font-color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SANDARC VEC<text:tab/><text:tab/><text:tab/><text:tab/><text:tab/><text:tab/> <text:s text:c="29"/>sandarc.org</text:span></text:p>
      </style:header>
      <style:footer>
        <text:p text:style-name="MP1"><text:span text:style-name="MT2">Rev. Jul 2026</text:span></text:p>
      </style:footer>
    </style:master-page>
    <style:master-page style:name="First_20_Page" style:display-name="First Page" style:page-layout-name="Mpm2" style:next-style-name="Standard">
      <style:header>
        <text:p text:style-name="Standard"><text:span text:style-name="MT3">N6IVC<text:tab/><text:tab/><text:tab/><text:tab/><text:tab/><text:tab/> <text:s text:c="15"/><text:tab/><text:tab/><text:tab/> <text:s text:c="12"/>IVC.RADIO</text:span></text:p>
        <text:p text:style-name="Standard"/>
      </style:header>
      <style:footer>
        <text:p text:style-name="Standard"><text:span text:style-name="MT4">Post-session instructions on the back of this page. Please read after the exam!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192" meta:character-count="1113" meta:non-whitespace-character-count="868"/>
    <meta:generator>LibreOfficeDev/6.0.5.2$Linux_X86_64 LibreOffice_project/</meta:generator>
  </office:meta>
</office:document-meta>
</file>